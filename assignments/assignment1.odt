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, monospace"/>
  </office:font-face-decls>
  <office:automatic-styles>
    <style:style style:name="P1" style:family="paragraph" style:parent-style-name="Standard">
      <style:text-properties officeooo:rsid="000e0c6f" officeooo:paragraph-rsid="000e0c6f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weight="normal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weight="normal" officeooo:rsid="000e0c6f" officeooo:paragraph-rsid="000e0c6f"/>
    </style:style>
    <style:style style:name="P4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6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7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style:text-blinking="false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color="#188038" loext:opacity="100%" style:font-name="Roboto Mono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text:span text:style-name="T4">: Git Workflow Practice with Branches and Pull Requests</text:span></text:p>
      <text:p text:style-name="P2"><text:span text:style-name="T2">Goal:</text:span><text:span text:style-name="T5"> </text:span><text:span text:style-name="T1">Practice git commands including add, commit, branching, upstream syncing, and pull requests.</text:span></text:p>
      <text:p text:style-name="P8">Steps:</text:p>
      <text:list text:style-name="L1">
        <text:list-item>
          <text:p text:style-name="P5"><text:span text:style-name="T7">Create a new folder called </text:span><text:span text:style-name="T8">git-practice</text:span><text:span text:style-name="T7">.</text:span></text:p>
        </text:list-item>
        <text:list-item>
          <text:p text:style-name="P6"><text:span text:style-name="T7">Initialize a git repo (</text:span><text:span text:style-name="T8">git init</text:span><text:span text:style-name="T7">).</text:span></text:p>
        </text:list-item>
        <text:list-item>
          <text:p text:style-name="P6"><text:span text:style-name="T7">Create a </text:span><text:span text:style-name="T8">README.md</text:span><text:span text:style-name="T7"> and write a short description.</text:span></text:p>
        </text:list-item>
        <text:list-item>
          <text:p text:style-name="P6"><text:span text:style-name="T7">Add and commit the </text:span><text:span text:style-name="T8">README.md</text:span><text:span text:style-name="T7">.</text:span></text:p>
        </text:list-item>
        <text:list-item>
          <text:p text:style-name="P6"><text:span text:style-name="T7">Create a new branch called </text:span><text:span text:style-name="T8">feature-xyz</text:span><text:span text:style-name="T7">.</text:span></text:p>
        </text:list-item>
        <text:list-item>
          <text:p text:style-name="P6"><text:span text:style-name="T7">Switch to the </text:span><text:span text:style-name="T8">feature-xyz</text:span><text:span text:style-name="T7"> branch.</text:span></text:p>
        </text:list-item>
        <text:list-item>
          <text:p text:style-name="P6"><text:span text:style-name="T7">Create a new file </text:span><text:span text:style-name="T8">feature.txt</text:span><text:span text:style-name="T7"> and add some content.</text:span></text:p>
        </text:list-item>
        <text:list-item>
          <text:p text:style-name="P4">Add, commit the new file on this branch.<text:span text:style-name="T3"/></text:p>
        </text:list-item>
        <text:list-item>
          <text:p text:style-name="P4">Push your branch to your remote repo on GitHub.<text:span text:style-name="T3"/></text:p>
        </text:list-item>
        <text:list-item>
          <text:p text:style-name="P6"><text:span text:style-name="T7">On GitHub, create a pull request from </text:span><text:span text:style-name="T8">feature-xyz</text:span><text:span text:style-name="T7"> to </text:span><text:span text:style-name="T8">main</text:span><text:span text:style-name="T7">.</text:span></text:p>
        </text:list-item>
        <text:list-item>
          <text:p text:style-name="P6"><text:span text:style-name="T7">Meanwhile, on your </text:span><text:span text:style-name="T8">main</text:span><text:span text:style-name="T7"> branch locally, simulate a change (edit </text:span><text:span text:style-name="T8">README.md</text:span><text:span text:style-name="T7">) and commit it.</text:span></text:p>
        </text:list-item>
        <text:list-item>
          <text:p text:style-name="P6"><text:span text:style-name="T7">Fetch and pull changes from remote to keep your local </text:span><text:span text:style-name="T8">main</text:span><text:span text:style-name="T7"> updated.</text:span></text:p>
        </text:list-item>
        <text:list-item>
          <text:p text:style-name="P6"><text:span text:style-name="T7">Rebase your </text:span><text:span text:style-name="T8">feature-xyz</text:span><text:span text:style-name="T7"> branch on top of the updated </text:span><text:span text:style-name="T8">main</text:span><text:span text:style-name="T7">.</text:span></text:p>
        </text:list-item>
        <text:list-item>
          <text:p text:style-name="P4">Resolve any merge conflicts if they arise.<text:span text:style-name="T3"/></text:p>
        </text:list-item>
        <text:list-item>
          <text:p text:style-name="P7"><text:span text:style-name="T7">Push the rebased </text:span><text:span text:style-name="T8">feature-xyz</text:span><text:span text:style-name="T7"> branch to remote again.</text:span></text:p>
        </text:list-item>
      </text:list>
      <text:p text:style-name="P2"><text:span text:style-name="T2">Bonus:</text:span><text:span text:style-name="T5"> </text:span><text:span text:style-name="T1">Use </text:span><text:span text:style-name="T6">git stash</text:span><text:span text:style-name="T5"> </text:span><text:span text:style-name="T1">to temporarily save your work and then apply it back.</text:span></text:p>
      <text:p text:style-name="P3"><text:span text:style-name="T1">Screenshots </text:span></text:p>
      <text:p text:style-name="P3"><text:span text:style-name="T1"/></text:p>
      <text:p text:style-name="P3"><text:span text:style-name="T1">Learnings</text:span>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4:48:12.031002455</meta:creation-date>
    <dc:date>2025-05-16T14:50:46.426353236</dc:date>
    <meta:editing-duration>PT2M35S</meta:editing-duration>
    <meta:editing-cycles>1</meta:editing-cycles>
    <meta:document-statistic meta:table-count="0" meta:image-count="0" meta:object-count="0" meta:page-count="1" meta:paragraph-count="22" meta:word-count="178" meta:character-count="1030" meta:non-whitespace-character-count="886"/>
    <meta:generator>LibreOffice/24.2.7.2$Linux_X86_64 LibreOffice_project/420$Build-2</meta:generator>
  </office:meta>
</office:document-meta>
</file>